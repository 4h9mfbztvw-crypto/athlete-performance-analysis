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3" style:family="paragraph"/>
    <style:style style:name="P11" style:parent-style-name="Normal" style:list-style-name="LFO3" style:family="paragraph"/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4" style:family="paragraph"/>
    <style:style style:name="P14" style:parent-style-name="Normal" style:list-style-name="LFO4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5" style:family="paragraph"/>
    <style:style style:name="P18" style:parent-style-name="Normal" style:list-style-name="LFO5" style:family="paragraph"/>
    <style:style style:name="P19" style:parent-style-name="Normal" style:list-style-name="LFO5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6" style:family="paragraph"/>
    <style:style style:name="P22" style:parent-style-name="Normal" style:list-style-name="LFO6" style:family="paragraph"/>
    <style:style style:name="P23" style:parent-style-name="Normal" style:list-style-name="LFO6" style:family="paragraph"/>
    <style:style style:name="P24" style:parent-style-name="Normal" style:list-style-name="LFO7" style:family="paragraph"/>
    <style:style style:name="P25" style:parent-style-name="Normal" style:list-style-name="LFO7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8" style:family="paragraph"/>
    <style:style style:name="P28" style:parent-style-name="Normal" style:list-style-name="LFO8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9" style:family="paragraph"/>
    <style:style style:name="P32" style:parent-style-name="Normal" style:list-style-name="LFO9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10" style:family="paragraph"/>
    <style:style style:name="P35" style:parent-style-name="Normal" style:list-style-name="LFO10" style:family="paragraph"/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11" style:family="paragraph"/>
    <style:style style:name="P39" style:parent-style-name="Normal" style:list-style-name="LFO11" style:family="paragraph"/>
    <style:style style:name="P40" style:parent-style-name="Normal" style:list-style-name="LFO11" style:family="paragraph"/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list-style-name="LFO12" style:family="paragraph"/>
    <style:style style:name="P43" style:parent-style-name="Normal" style:list-style-name="LFO12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Intermediate SQL</text:p>
      <text:p text:style-name="P2">Question 12</text:p>
      <text:p text:style-name="Normal">Which<text:s/><text:span text:style-name="T3">Training Intensity</text:span><text:s/>has the highest average performance score?</text:p>
      <text:p text:style-name="Normal">Return:</text:p>
      <text:list text:style-name="LFO1" text:continue-numbering="true">
        <text:list-item>
          <text:p text:style-name="P4">Training_Intensity<text:s/></text:p>
        </text:list-item>
        <text:list-item>
          <text:p text:style-name="P5">AvgPerformance<text:s/></text:p>
        </text:list-item>
      </text:list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6">Question 13</text:p>
      <text:p text:style-name="Normal">Find the top 10 athletes with the highest ACL risk.</text:p>
      <text:p text:style-name="Normal">Return:</text:p>
      <text:list text:style-name="LFO2" text:continue-numbering="true">
        <text:list-item>
          <text:p text:style-name="P7">Athlete_ID<text:s/></text:p>
        </text:list-item>
        <text:list-item>
          <text:p text:style-name="P8">ACL_Risk_Score<text:s/></text:p>
        </text:list-item>
      </text:list>
      <text:p text:style-name="Norma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9">Question 14</text:p>
      <text:p text:style-name="Normal">What is the average heartbeat by Gender?</text:p>
      <text:p text:style-name="Normal">Return:</text:p>
      <text:list text:style-name="LFO3" text:continue-numbering="true">
        <text:list-item>
          <text:p text:style-name="P10">Gender<text:s/></text:p>
        </text:list-item>
        <text:list-item>
          <text:p text:style-name="P11">AvgHeartbeat<text:s/></text:p>
        </text:list-item>
      </text:list>
      <text:p text:style-name="Norma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12">Question 15</text:p>
      <text:p text:style-name="Normal">Which Gender has the highest average fatigue score?</text:p>
      <text:p text:style-name="Normal">Return:</text:p>
      <text:list text:style-name="LFO4" text:continue-numbering="true">
        <text:list-item>
          <text:p text:style-name="P13">Gender<text:s/></text:p>
        </text:list-item>
        <text:list-item>
          <text:p text:style-name="P14">AvgFatigue<text:s/></text:p>
        </text:list-item>
      </text:list>
      <text:p text:style-name="Norma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P15">Section B: CASE Statements</text:p>
      <text:p text:style-name="P16">Question 16</text:p>
      <text:p text:style-name="Normal">Create a Performance Category:</text:p>
      <text:soft-page-break/>
      <text:list text:style-name="LFO5" text:continue-numbering="true">
        <text:list-item>
          <text:p text:style-name="P17">Elite = 80+<text:s/></text:p>
        </text:list-item>
        <text:list-item>
          <text:p text:style-name="P18">Good = 60–79<text:s/></text:p>
        </text:list-item>
        <text:list-item>
          <text:p text:style-name="P19">Average = Below 60<text:s/></text:p>
        </text:list-item>
      </text:list>
      <text:p text:style-name="Normal">Count how many athletes belong to each category.</text:p>
      <text:p text:style-name="Norma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P20">Question 17</text:p>
      <text:p text:style-name="Normal">Create an Injury Risk Category:</text:p>
      <text:list text:style-name="LFO6" text:continue-numbering="true">
        <text:list-item>
          <text:p text:style-name="P21">High Risk = ACL_Risk_Score &gt;= 70<text:s/></text:p>
        </text:list-item>
        <text:list-item>
          <text:p text:style-name="P22">Medium Risk = 40–69<text:s/></text:p>
        </text:list-item>
        <text:list-item>
          <text:p text:style-name="P23">Low Risk = Below 40<text:s/></text:p>
        </text:list-item>
      </text:list>
      <text:p text:style-name="Normal">Show:</text:p>
      <text:list text:style-name="LFO7" text:continue-numbering="true">
        <text:list-item>
          <text:p text:style-name="P24">Risk Category<text:s/></text:p>
        </text:list-item>
        <text:list-item>
          <text:p text:style-name="P25">Number of Athletes<text:s/></text:p>
        </text:list-item>
      </text:list>
      <text:p text:style-name="Norma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P26">Question 18</text:p>
      <text:p text:style-name="Normal">For each Training Intensity, count:</text:p>
      <text:list text:style-name="LFO8" text:continue-numbering="true">
        <text:list-item>
          <text:p text:style-name="P27">Injured Athletes<text:s/></text:p>
        </text:list-item>
        <text:list-item>
          <text:p text:style-name="P28">Non-Injured Athletes<text:s/></text:p>
        </text:list-item>
      </text:list>
      <text:p text:style-name="Normal">Hint: CASE inside COUNT() or SUM().</text:p>
      <text:p text:style-name="Norma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29">Section C: HAVING</text:p>
      <text:p text:style-name="P30">Question 19</text:p>
      <text:p text:style-name="Normal">Show only Training Intensities whose average fatigue score is greater than 60.</text:p>
      <text:p text:style-name="Normal">Hint:</text:p>
      <text:list text:style-name="LFO9" text:continue-numbering="true">
        <text:list-item>
          <text:p text:style-name="P31">WHERE filters rows<text:s/></text:p>
        </text:list-item>
        <text:list-item>
          <text:p text:style-name="P32">HAVING filters groups<text:s/></text:p>
        </text:list-item>
      </text:list>
      <text:p text:style-name="Normal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33">Question 20</text:p>
      <text:soft-page-break/>
      <text:p text:style-name="Normal">Show genders with more than 200 athletes.</text:p>
      <text:p text:style-name="Normal">Return:</text:p>
      <text:list text:style-name="LFO10" text:continue-numbering="true">
        <text:list-item>
          <text:p text:style-name="P34">Gender<text:s/></text:p>
        </text:list-item>
        <text:list-item>
          <text:p text:style-name="P35">AthleteCount<text:s/></text:p>
        </text:list-item>
      </text:list>
      <text:p text:style-name="Norma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36">Section D: CTE Practice</text:p>
      <text:p text:style-name="P37">Question 21</text:p>
      <text:p text:style-name="Normal">Using a CTE, create a Fatigue Category:</text:p>
      <text:list text:style-name="LFO11" text:continue-numbering="true">
        <text:list-item>
          <text:p text:style-name="P38">High<text:s/></text:p>
        </text:list-item>
        <text:list-item>
          <text:p text:style-name="P39">Medium<text:s/></text:p>
        </text:list-item>
        <text:list-item>
          <text:p text:style-name="P40">Low<text:s/></text:p>
        </text:list-item>
      </text:list>
      <text:p text:style-name="Normal">Then calculate the average performance score for each category.</text:p>
      <text:p text:style-name="Norma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41">Question 22</text:p>
      <text:p text:style-name="Normal">Using a CTE, create a table showing:</text:p>
      <text:list text:style-name="LFO12" text:continue-numbering="true">
        <text:list-item>
          <text:p text:style-name="P42">Athlete_ID<text:s/></text:p>
        </text:list-item>
        <text:list-item>
          <text:p text:style-name="P43">FatigueLevel<text:s/></text:p>
        </text:list-item>
      </text:list>
      <text:p text:style-name="Normal">Then count athletes in each fatigue level.</text:p>
      <text:p text:style-name="Normal">(You've done something similar already.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wen Azzopardi</meta:initial-creator>
    <dc:creator>Owen Azzopardi</dc:creator>
    <meta:creation-date>2026-06-13T08:17:00Z</meta:creation-date>
    <dc:date>2026-06-13T08:24:00Z</dc:date>
    <meta:template xlink:href="Normal" xlink:type="simple"/>
    <meta:editing-cycles>1</meta:editing-cycles>
    <meta:editing-duration>PT180S</meta:editing-duration>
    <meta:document-statistic meta:page-count="3" meta:paragraph-count="2" meta:word-count="216" meta:character-count="1446" meta:row-count="10" meta:non-whitespace-character-count="1232"/>
  </office:meta>
</office:document-meta>
</file>