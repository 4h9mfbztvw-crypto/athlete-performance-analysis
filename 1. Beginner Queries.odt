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P21" style:parent-style-name="Normal" style:list-style-name="LFO3" style:family="paragraph"/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4" style:family="paragraph"/>
    <style:style style:name="P24" style:parent-style-name="Normal" style:list-style-name="LFO4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5" style:family="paragraph"/>
    <style:style style:name="P28" style:parent-style-name="Normal" style:list-style-name="LFO5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6" style:family="paragraph"/>
    <style:style style:name="P31" style:parent-style-name="Normal" style:list-style-name="LFO6" style:family="paragraph"/>
    <style:style style:name="P32" style:parent-style-name="Normal" style:list-style-name="LFO6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7" style:family="paragraph"/>
    <style:style style:name="P35" style:parent-style-name="Normal" style:list-style-name="LFO7" style:family="paragraph"/>
    <style:style style:name="P36" style:parent-style-name="Normal" style:list-style-name="LFO7" style:family="paragraph"/>
    <style:style style:name="P37" style:parent-style-name="Normal" style:list-style-name="LFO7" style:family="paragraph"/>
    <style:style style:name="P38" style:parent-style-name="Normal" style:list-style-name="LFO7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QL Beginner Quiz – Athlete Dataset</text:p>
      <text:p text:style-name="P2">Question 1</text:p>
      <text:p text:style-name="Normal">How many athletes are in the dataset?</text:p>
      <text:p text:style-name="Normal"><text:span text:style-name="T3">Task:</text:span><text:s/>Write a query that returns the total number of rows in AthleteData.</text:p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4">Question 2</text:p>
      <text:p text:style-name="Normal">What is the average Performance Score across all athletes?</text:p>
      <text:p text:style-name="Normal"><text:span text:style-name="T5">Task:</text:span><text:s/>Return a single value named AvgPerformance.</text:p>
      <text:p text:style-name="Norma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6">Question 3</text:p>
      <text:p text:style-name="Normal">How many athletes have a Fatigue Score greater than 80?</text:p>
      <text:p text:style-name="Normal"><text:span text:style-name="T7">Task:</text:span><text:s/>Return the count only.</text:p>
      <text:p text:style-name="Norma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8">Question 4</text:p>
      <text:p text:style-name="Normal">Show the 5 athletes with the highest Performance Score.</text:p>
      <text:p text:style-name="Normal"><text:span text:style-name="T9">Task:</text:span><text:s/>Include:</text:p>
      <text:list text:style-name="LFO1" text:continue-numbering="true">
        <text:list-item>
          <text:p text:style-name="P10">Athlete_ID<text:s/></text:p>
        </text:list-item>
        <text:list-item>
          <text:p text:style-name="P11">Performance_Score<text:s/></text:p>
        </text:list-item>
      </text:list>
      <text:p text:style-name="Normal">Sort correctly.</text:p>
      <text:p text:style-name="Norma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P12">Question 5</text:p>
      <text:p text:style-name="Normal">What are the distinct Training Intensity categories in the dataset?</text:p>
      <text:p text:style-name="Normal"><text:span text:style-name="T13">Task:</text:span><text:s/>Return each category once.</text:p>
      <text:p text:style-name="Norma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P14">Question 6</text:p>
      <text:p text:style-name="Normal">How many athletes belong to each Gender?</text:p>
      <text:p text:style-name="Normal"><text:span text:style-name="T15">Task:</text:span><text:s/>Show:</text:p>
      <text:list text:style-name="LFO2" text:continue-numbering="true">
        <text:list-item>
          <text:p text:style-name="P16">Gender<text:s/></text:p>
        </text:list-item>
        <text:list-item>
          <text:p text:style-name="P17">AthleteCount<text:s/></text:p>
        </text:list-item>
      </text:list>
      <text:p text:style-name="Norma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P18">Question 7</text:p>
      <text:p text:style-name="Normal">Which Training Intensity has the highest average Fatigue Score?</text:p>
      <text:p text:style-name="Normal"><text:span text:style-name="T19">Task:</text:span><text:s/>Show:</text:p>
      <text:list text:style-name="LFO3" text:continue-numbering="true">
        <text:list-item>
          <text:p text:style-name="P20">Training_Intensity<text:s/></text:p>
        </text:list-item>
        <text:list-item>
          <text:p text:style-name="P21">AvgFatigue<text:s/></text:p>
        </text:list-item>
      </text:list>
      <text:p text:style-name="Normal">Sort so the answer appears first.</text:p>
      <text:p text:style-name="Norma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22">Question 8</text:p>
      <text:p text:style-name="Normal">Find all athletes who:</text:p>
      <text:list text:style-name="LFO4" text:continue-numbering="true">
        <text:list-item>
          <text:p text:style-name="P23">Have Fatigue Score &gt; 75<text:s/></text:p>
        </text:list-item>
        <text:list-item>
          <text:p text:style-name="P24">AND Performance Score &lt; 50<text:s/></text:p>
        </text:list-item>
      </text:list>
      <text:p text:style-name="Normal">How many are there?</text:p>
      <text:p text:style-name="Normal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25">Question 9</text:p>
      <text:p text:style-name="Normal">What is the average ACL Risk Score by Gender?</text:p>
      <text:p text:style-name="Normal"><text:span text:style-name="T26">Task:</text:span><text:s/>Show:</text:p>
      <text:list text:style-name="LFO5" text:continue-numbering="true">
        <text:list-item>
          <text:p text:style-name="P27">Gender<text:s/></text:p>
        </text:list-item>
        <text:list-item>
          <text:p text:style-name="P28">AvgACLRisk<text:s/></text:p>
        </text:list-item>
      </text:list>
      <text:p text:style-name="Norma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29">Question 10</text:p>
      <text:p text:style-name="Normal">Create a category called FatigueLevel:</text:p>
      <text:list text:style-name="LFO6" text:continue-numbering="true">
        <text:list-item>
          <text:p text:style-name="P30">High = 80+<text:s/></text:p>
        </text:list-item>
        <text:list-item>
          <text:p text:style-name="P31">Medium = 50–79<text:s/></text:p>
        </text:list-item>
        <text:list-item>
          <text:p text:style-name="P32">Low = Below 50<text:s/></text:p>
        </text:list-item>
      </text:list>
      <text:p text:style-name="Normal">Count how many athletes fall into each category.</text:p>
      <text:p text:style-name="Norma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33">Challenge Question 11</text:p>
      <text:p text:style-name="Normal">Create one summary table showing:</text:p>
      <text:list text:style-name="LFO7" text:continue-numbering="true">
        <text:list-item>
          <text:p text:style-name="P34">Training_Intensity<text:s/></text:p>
        </text:list-item>
        <text:list-item>
          <text:p text:style-name="P35">Number of Athletes<text:s/></text:p>
        </text:list-item>
        <text:list-item>
          <text:p text:style-name="P36">Average Performance<text:s/></text:p>
        </text:list-item>
        <text:list-item>
          <text:p text:style-name="P37">Average Fatigue<text:s/></text:p>
        </text:list-item>
        <text:list-item>
          <text:p text:style-name="P38">Average ACL Risk<text:s/></text:p>
        </text:list-item>
      </text:list>
      <text:p text:style-name="Normal">Sort by Average Performance descending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wen Azzopardi</meta:initial-creator>
    <dc:creator>Owen Azzopardi</dc:creator>
    <meta:creation-date>2026-06-11T16:03:00Z</meta:creation-date>
    <dc:date>2026-06-11T17:39:00Z</dc:date>
    <meta:template xlink:href="Normal" xlink:type="simple"/>
    <meta:editing-cycles>1</meta:editing-cycles>
    <meta:editing-duration>PT3000S</meta:editing-duration>
    <meta:document-statistic meta:page-count="3" meta:paragraph-count="2" meta:word-count="210" meta:character-count="1406" meta:row-count="9" meta:non-whitespace-character-count="1198"/>
  </office:meta>
</office:document-meta>
</file>